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ODELO CRIAÇÃO (BUILDER)</text:h>
      <text:p text:style-name="Text_20_body"><text:span text:style-name="T1">RF031 (Cenário Válido)</text:span></text:p>
      <text:list text:style-name="L1">
        <text:list-item>
          <text:p text:style-name="P2"><text:span text:style-name="T1">Resumo:</text:span> Criar apólice completa com todas as assistências.</text:p>
        </text:list-item>
        <text:list-item>
          <text:p text:style-name="P2"><text:span text:style-name="T1">Pré-condição:</text:span> Corretor na tela de emissão de novos contratos.</text:p>
        </text:list-item>
        <text:list-item>
          <text:p text:style-name="P2"><text:span text:style-name="T1">Entradas:</text:span> Dados do cliente, do veículo e seleção de todas as assistências.</text:p>
        </text:list-item>
        <text:list-item>
          <text:p text:style-name="P2"><text:span text:style-name="T1">Ação:</text:span> Chamar o construtor da apólice incluindo as coberturas e clicar em finalizar.</text:p>
        </text:list-item>
        <text:list-item>
          <text:p text:style-name="P2"><text:span text:style-name="T1">Resultado Esperado:</text:span> Objeto apólice gerado com sucesso contendo todos os itens.</text:p>
        </text:list-item>
        <text:list-item>
          <text:p text:style-name="P2"><text:span text:style-name="T1">Pós-condição:</text:span> Apólice completa gravada no banco de dados.</text:p>
        </text:list-item>
      </text:list>
      <text:p text:style-name="Text_20_body"><text:span text:style-name="T1">RF032 (Cenário Alternativo)</text:span></text:p>
      <text:list text:style-name="L2">
        <text:list-item>
          <text:p text:style-name="P3"><text:span text:style-name="T1">Resumo:</text:span> Criar apólice enxuta sem nenhuma assistência.</text:p>
        </text:list-item>
        <text:list-item>
          <text:p text:style-name="P3"><text:span text:style-name="T1">Pré-condição:</text:span> Corretor na tela de configuração de proposta.</text:p>
        </text:list-item>
        <text:list-item>
          <text:p text:style-name="P3"><text:span text:style-name="T1">Entradas:</text:span> Dados obrigatórios do segurado e nenhuma assistência marcada.</text:p>
        </text:list-item>
        <text:list-item>
          <text:p text:style-name="P3"><text:span text:style-name="T1">Ação:</text:span> Executar a finalização do construtor pulando as etapas de serviços opcionais.</text:p>
        </text:list-item>
        <text:list-item>
          <text:p text:style-name="P3"><text:span text:style-name="T1">Resultado Esperado:</text:span> Objeto criado contendo estritamente a cobertura básica de acidentes.</text:p>
        </text:list-item>
        <text:list-item>
          <text:p text:style-name="P3"><text:span text:style-name="T1">Pós-condição:</text:span> Contrato simplificado registrado sem custos adicionais.</text:p>
        </text:list-item>
      </text:list>
      <text:p text:style-name="Text_20_body"><text:span text:style-name="T1">RF033 (Cenário de Exceção)</text:span></text:p>
      <text:list text:style-name="L3">
        <text:list-item>
          <text:p text:style-name="P4"><text:span text:style-name="T1">Resumo:</text:span> Criar apólice com dados inválidos.</text:p>
        </text:list-item>
        <text:list-item>
          <text:p text:style-name="P4"><text:span text:style-name="T1">Pré-condição:</text:span> Sistema aguardando dados para montagem do contrato.</text:p>
        </text:list-item>
        <text:list-item>
          <text:p text:style-name="P4"><text:span text:style-name="T1">Entradas:</text:span> Vigência com data retroativa ou CPF em formato corrompido.</text:p>
        </text:list-item>
        <text:list-item>
          <text:p text:style-name="P4"><text:span text:style-name="T1">Ação:</text:span> Tentar finalizar a construção da apólice invocando o método build.</text:p>
        </text:list-item>
        <text:list-item>
          <text:p text:style-name="P4"><text:span text:style-name="T1">Resultado Esperado:</text:span> O construtor intercepta os erros, barra a criação do objeto e lança uma exceção.</text:p>
        </text:list-item>
        <text:list-item>
          <text:p text:style-name="P4"><text:span text:style-name="T1">Pós-condição:</text:span> O sistema impede a gravação e mantém o formulário aberto para correção.</text:p>
        </text:list-item>
      </text:list>
      <text:p text:style-name="Horizontal_20_Line"><text:soft-page-break/></text:p>
      <text:h text:style-name="Heading_20_3" text:outline-level="3">MODELO ESTRUTURAL (DECORATOR)</text:h>
      <text:p text:style-name="Text_20_body"><text:span text:style-name="T1">RF034 (Cenário Válido)</text:span></text:p>
      <text:list text:style-name="L4">
        <text:list-item>
          <text:p text:style-name="P5"><text:span text:style-name="T1">Resumo:</text:span> Emitir e calcular plano de seguro base.</text:p>
        </text:list-item>
        <text:list-item>
          <text:p text:style-name="P5"><text:span text:style-name="T1">Pré-condição:</text:span> Cliente selecionou o pacote de proteção inicial da seguradora.</text:p>
        </text:list-item>
        <text:list-item>
          <text:p text:style-name="P5"><text:span text:style-name="T1">Entradas:</text:span> Código do seguro básico sem opcionais.</text:p>
        </text:list-item>
        <text:list-item>
          <text:p text:style-name="P5"><text:span text:style-name="T1">Ação:</text:span> Chamar a função de cálculo passando apenas o componente central.</text:p>
        </text:list-item>
        <text:list-item>
          <text:p text:style-name="P5"><text:span text:style-name="T1">Resultado Esperado:</text:span> Retorno exato do valor de tabela padrão da cobertura básica.</text:p>
        </text:list-item>
        <text:list-item>
          <text:p text:style-name="P5"><text:span text:style-name="T1">Pós-condição:</text:span> Preço base exibido no extrato sem qualquer acréscimo.</text:p>
        </text:list-item>
      </text:list>
      <text:p text:style-name="Text_20_body"><text:span text:style-name="T1">RF035 (Cenário Alternativo)</text:span></text:p>
      <text:list text:style-name="L5">
        <text:list-item>
          <text:p text:style-name="P6"><text:span text:style-name="T1">Resumo:</text:span> Adicionar dinamicamente as assistências opcionais (24h, Carro Reserva e Vidros).</text:p>
        </text:list-item>
        <text:list-item>
          <text:p text:style-name="P6"><text:span text:style-name="T1">Pré-condição:</text:span> Seguro base já instanciado no escopo da sessão.</text:p>
        </text:list-item>
        <text:list-item>
          <text:p text:style-name="P6"><text:span text:style-name="T1">Entradas:</text:span> Seleção simultânea de uma ou mais flags de coberturas extras.</text:p>
        </text:list-item>
        <text:list-item>
          <text:p text:style-name="P6"><text:span text:style-name="T1">Ação:</text:span> Envolver o seguro base nos respectivos decoradores de serviço escolhidos.</text:p>
        </text:list-item>
        <text:list-item>
          <text:p text:style-name="P6"><text:span text:style-name="T1">Resultado Esperado:</text:span> O sistema aceita o empilhamento dos objetos e calcula o preço de forma incremental.</text:p>
        </text:list-item>
        <text:list-item>
          <text:p text:style-name="P6"><text:span text:style-name="T1">Pós-condição:</text:span> Resumo da contratação exibe todos os serviços adicionais acoplados.</text:p>
        </text:list-item>
      </text:list>
      <text:p text:style-name="Text_20_body"><text:span text:style-name="T1">RF036 (Cenário de Exceção)</text:span></text:p>
      <text:list text:style-name="L6">
        <text:list-item>
          <text:p text:style-name="P7"><text:span text:style-name="T1">Resumo:</text:span> Tentar aplicar decorador duplicado ou incompatível.</text:p>
        </text:list-item>
        <text:list-item>
          <text:p text:style-name="P7"><text:span text:style-name="T1">Pré-condição:</text:span> Apólice de seguro base já possui o decorador de "Assistência 24h" ativo.</text:p>
        </text:list-item>
        <text:list-item>
          <text:p text:style-name="P7"><text:span text:style-name="T1">Entradas:</text:span> Nova tentativa de marcar e adicionar a mesma "Assistência 24h".</text:p>
        </text:list-item>
        <text:list-item>
          <text:p text:style-name="P7"><text:span text:style-name="T1">Ação:</text:span> Processar o objeto na tentativa de empilhar o mesmo decorador repetido.</text:p>
        </text:list-item>
        <text:list-item>
          <text:p text:style-name="P7"><text:soft-page-break/><text:span text:style-name="T1">Resultado Esperado:</text:span> O sistema identifica a duplicidade do serviço, bloqueia a operação e gera alerta de conflito.</text:p>
        </text:list-item>
        <text:list-item>
          <text:p text:style-name="P7"><text:span text:style-name="T1">Pós-condição:</text:span> O preço não é alterado de forma errônea e mantém-se a integridade da apólice.</text:p>
        </text:list-item>
      </text:list>
      <text:p text:style-name="Text_20_body"><text:span text:style-name="T1">RF037 (Cenário Válido)</text:span></text:p>
      <text:list text:style-name="L7">
        <text:list-item>
          <text:p text:style-name="P8"><text:span text:style-name="T1">Resumo:</text:span> Verificar a soma correta dos valores com múltiplas coberturas.</text:p>
        </text:list-item>
        <text:list-item>
          <text:p text:style-name="P8"><text:span text:style-name="T1">Pré-condição:</text:span> Seguro base envolto por três camadas de serviços opcionais distintos.</text:p>
        </text:list-item>
        <text:list-item>
          <text:p text:style-name="P8"><text:span text:style-name="T1">Entradas:</text:span> Comando de fechamento de fatura com os valores individuais parametrizados.</text:p>
        </text:list-item>
        <text:list-item>
          <text:p text:style-name="P8"><text:span text:style-name="T1">Ação:</text:span> Disparar o método de precificação totalizado para auditar os valores.</text:p>
        </text:list-item>
        <text:list-item>
          <text:p text:style-name="P8"><text:span text:style-name="T1">Resultado Esperado:</text:span> O sistema realiza a soma perfeita de cada parcela decoradora, batendo centavo por centavo.</text:p>
        </text:list-item>
        <text:list-item>
          <text:p text:style-name="P8"><text:span text:style-name="T1">Pós-condição:</text:span> Nota fiscal gerada com o somatório correto para o faturamento.</text:p>
        </text:list-item>
      </text:list>
      <text:p text:style-name="Horizontal_20_Line"/>
      <text:h text:style-name="Heading_20_3" text:outline-level="3">MODELO COMPORTAMENTAL (STRATEGY)</text:h>
      <text:p text:style-name="Text_20_body"><text:span text:style-name="T1">RF038 (Cenário Válido)</text:span></text:p>
      <text:list text:style-name="L8">
        <text:list-item>
          <text:p text:style-name="P9"><text:span text:style-name="T1">Resumo:</text:span> Executar cálculo básico de risco.</text:p>
        </text:list-item>
        <text:list-item>
          <text:p text:style-name="P9"><text:span text:style-name="T1">Pré-condição:</text:span> Tabelas de coeficientes padrão ativas no sistema.</text:p>
        </text:list-item>
        <text:list-item>
          <text:p text:style-name="P9"><text:span text:style-name="T1">Entradas:</text:span> Dados de cliente regular sem histórico de sinistros.</text:p>
        </text:list-item>
        <text:list-item>
          <text:p text:style-name="P9"><text:span text:style-name="T1">Ação:</text:span> Injetar a estratégia de cálculo básico no motor de preços.</text:p>
        </text:list-item>
        <text:list-item>
          <text:p text:style-name="P9"><text:span text:style-name="T1">Resultado Esperado:</text:span> Aplicação da equação linear padrão, resultando no valor de tabela normal.</text:p>
        </text:list-item>
        <text:list-item>
          <text:p text:style-name="P9"><text:span text:style-name="T1">Pós-condição:</text:span> Prêmio do seguro calculado pela rotina ordinária da empresa.</text:p>
        </text:list-item>
      </text:list>
      <text:p text:style-name="Text_20_body"><text:span text:style-name="T1">RF039 (Cenário Válido)</text:span></text:p>
      <text:list text:style-name="L9">
        <text:list-item>
          <text:p text:style-name="P10"><text:span text:style-name="T1">Resumo:</text:span> Executar cálculo premium de risco.</text:p>
        </text:list-item>
        <text:list-item>
          <text:p text:style-name="P10"><text:span text:style-name="T1">Pré-condição:</text:span> Cliente com a tag de categoria premium ativa no banco de dados.</text:p>
        </text:list-item>
        <text:list-item>
          <text:p text:style-name="P10"><text:soft-page-break/><text:span text:style-name="T1">Entradas:</text:span> Solicitação de cotação para veículo de alto padrão.</text:p>
        </text:list-item>
        <text:list-item>
          <text:p text:style-name="P10"><text:span text:style-name="T1">Ação:</text:span> Chavear o algoritmo do contexto para a estratégia de cálculo premium.</text:p>
        </text:list-item>
        <text:list-item>
          <text:p text:style-name="P10"><text:span text:style-name="T1">Resultado Esperado:</text:span> Computação com taxas diferenciadas e margens reduzidas de fidelidade.</text:p>
        </text:list-item>
        <text:list-item>
          <text:p text:style-name="P10"><text:span text:style-name="T1">Pós-condição:</text:span> Cotação com benefícios premium exibida na tela.</text:p>
        </text:list-item>
      </text:list>
      <text:p text:style-name="Text_20_body"><text:span text:style-name="T1">RF040 (Cenário Válido)</text:span></text:p>
      <text:list text:style-name="L10">
        <text:list-item>
          <text:p text:style-name="P11"><text:span text:style-name="T1">Resumo:</text:span> Executar cálculo empresarial para frotas comerciais.</text:p>
        </text:list-item>
        <text:list-item>
          <text:p text:style-name="P11"><text:span text:style-name="T1">Pré-condição:</text:span> Operador iniciou proposta utilizando um CNPJ válido.</text:p>
        </text:list-item>
        <text:list-item>
          <text:p text:style-name="P11"><text:span text:style-name="T1">Entradas:</text:span> Lista com múltiplos veículos comerciais na mesma apólice.</text:p>
        </text:list-item>
        <text:list-item>
          <text:p text:style-name="P11"><text:span text:style-name="T1">Ação:</text:span> Alterar o motor de cálculo para usar a estratégia empresarial.</text:p>
        </text:list-item>
        <text:list-item>
          <text:p text:style-name="P11"><text:span text:style-name="T1">Resultado Esperado:</text:span> Processamento em lote com aplicação automática do desconto progressivo por quantidade.</text:p>
        </text:list-item>
        <text:list-item>
          <text:p text:style-name="P11"><text:span text:style-name="T1">Pós-condição:</text:span> Valor unificado da frota registrado com sucesso.</text:p>
        </text:list-item>
      </text:list>
      <text:p text:style-name="Text_20_body"><text:span text:style-name="T1">RF041 (Cenário Alternativo)</text:span></text:p>
      <text:list text:style-name="L11">
        <text:list-item>
          <text:p text:style-name="P12"><text:span text:style-name="T1">Resumo:</text:span> Executar cálculo adaptado para cliente jovem (risco agravado).</text:p>
        </text:list-item>
        <text:list-item>
          <text:p text:style-name="P12"><text:span text:style-name="T1">Pré-condição:</text:span> Idade do condutor informada no cadastro é igual ou inferior a 24 anos.</text:p>
        </text:list-item>
        <text:list-item>
          <text:p text:style-name="P12"><text:span text:style-name="T1">Entradas:</text:span> Dados do condutor jovem no formulário do seguro.</text:p>
        </text:list-item>
        <text:list-item>
          <text:p text:style-name="P12"><text:span text:style-name="T1">Ação:</text:span> Processar o preço permitindo que o contexto aplique a estratégia para menor de 25 anos.</text:p>
        </text:list-item>
        <text:list-item>
          <text:p text:style-name="P12"><text:span text:style-name="T1">Resultado Esperado:</text:span> Elevação proporcional da taxa de sinistralidade conforme o risco estatístico do grupo.</text:p>
        </text:list-item>
        <text:list-item>
          <text:p text:style-name="P12"><text:span text:style-name="T1">Pós-condição:</text:span> Valor reajustado fixado na proposta de seguro do jovem.</text:p>
        </text:list-item>
      </text:list>
      <text:p text:style-name="Text_20_body"><text:span text:style-name="T1">RF042 (Cenário Alternativo)</text:span></text:p>
      <text:list text:style-name="L12">
        <text:list-item>
          <text:p text:style-name="P13"><text:span text:style-name="T1">Resumo:</text:span> Executar cálculo para cliente experiente (aplicação de bônus).</text:p>
        </text:list-item>
        <text:list-item>
          <text:p text:style-name="P13"><text:span text:style-name="T1">Pré-condição:</text:span> Condutor com mais de 10 anos de habilitação e sem sinistros.</text:p>
        </text:list-item>
        <text:list-item>
          <text:p text:style-name="P13"><text:span text:style-name="T1">Entradas:</text:span> Histórico verificado e classe de bônus máxima inserida.</text:p>
        </text:list-item>
        <text:list-item>
          <text:p text:style-name="P13"><text:soft-page-break/><text:span text:style-name="T1">Ação:</text:span> Direcionar o cálculo para a estratégia de condutor experiente.</text:p>
        </text:list-item>
        <text:list-item>
          <text:p text:style-name="P13"><text:span text:style-name="T1">Resultado Esperado:</text:span> Redução automática do prêmio aplicando o desconto por tempo de direção.</text:p>
        </text:list-item>
        <text:list-item>
          <text:p text:style-name="P13"><text:span text:style-name="T1">Pós-condição:</text:span> Cotação bonificada disponibilizada para fechamento.</text:p>
        </text:list-item>
      </text:list>
      <text:p text:style-name="Text_20_body"><text:span text:style-name="T1">RF043 (Cenário Alternativo)</text:span></text:p>
      <text:list text:style-name="L13">
        <text:list-item>
          <text:p text:style-name="P14"><text:span text:style-name="T1">Resumo:</text:span> Executar cálculo específico para veículo esportivo.</text:p>
        </text:list-item>
        <text:list-item>
          <text:p text:style-name="P14"><text:span text:style-name="T1">Pré-condição:</text:span> Modelo do carro classificado de fábrica como esportivo de alta potência.</text:p>
        </text:list-item>
        <text:list-item>
          <text:p text:style-name="P14"><text:span text:style-name="T1">Entradas:</text:span> Código do veículo no formulário da apólice.</text:p>
        </text:list-item>
        <text:list-item>
          <text:p text:style-name="P14"><text:span text:style-name="T1">Ação:</text:span> Acionar o processador utilizando a estratégia de avaliação esportiva.</text:p>
        </text:list-item>
        <text:list-item>
          <text:p text:style-name="P14"><text:span text:style-name="T1">Resultado Esperado:</text:span> Inclusão de coeficientes de risco e custos de manutenção elevados no montante final.</text:p>
        </text:list-item>
        <text:list-item>
          <text:p text:style-name="P14"><text:span text:style-name="T1">Pós-condição:</text:span> Prêmio recalculado exibido na tela para conferência.</text:p>
        </text:list-item>
      </text:list>
      <text:p text:style-name="Text_20_body"><text:span text:style-name="T1">RF044 (Cenário de Exceção)</text:span></text:p>
      <text:list text:style-name="L14">
        <text:list-item>
          <text:p text:style-name="P15"><text:span text:style-name="T1">Resumo:</text:span> Tratar falha ao selecionar estratégia de cálculo inexistente ou nula.</text:p>
        </text:list-item>
        <text:list-item>
          <text:p text:style-name="P15"><text:span text:style-name="T1">Pré-condição:</text:span> Motor de cálculo aguardando a definição do perfil do cliente.</text:p>
        </text:list-item>
        <text:list-item>
          <text:p text:style-name="P15"><text:span text:style-name="T1">Entradas:</text:span> Perfil de cliente ausente ou código de estratégia corrompido.</text:p>
        </text:list-item>
        <text:list-item>
          <text:p text:style-name="P15"><text:span text:style-name="T1">Ação:</text:span> Tentar rodar a precificação com uma estratégia nula (null).</text:p>
        </text:list-item>
        <text:list-item>
          <text:p text:style-name="P15"><text:span text:style-name="T1">Resultado Esperado:</text:span> O contexto do padrão Strategy impede a execução, lança uma exceção de ponteiro nulo e não deixa o sistema travar.</text:p>
        </text:list-item>
        <text:list-item>
          <text:p text:style-name="P15"><text:span text:style-name="T1">Pós-condição:</text:span> Sistema exibe aviso para selecionar um perfil válido antes de calcular.</text:p>
        </text:list-item>
      </text:list>
      <text:p text:style-name="Text_20_body"><text:span text:style-name="T1">RF045 (Cenário de Exceção)</text:span></text:p>
      <text:list text:style-name="L15">
        <text:list-item>
          <text:p text:style-name="P16"><text:span text:style-name="T1">Resumo:</text:span> Tratar erro de dados de entrada fora dos limites das estratégias.</text:p>
        </text:list-item>
        <text:list-item>
          <text:p text:style-name="P16"><text:span text:style-name="T1">Pré-condição:</text:span> Sistema pronto para aplicar o algoritmo de precificação por idade.</text:p>
        </text:list-item>
        <text:list-item>
          <text:p text:style-name="P16"><text:span text:style-name="T1">Entradas:</text:span> Idade informada com valor absurdo ou negativo (ex: -5 ou 200 anos).</text:p>
        </text:list-item>
        <text:list-item>
          <text:p text:style-name="P16"><text:span text:style-name="T1">Ação:</text:span> Submeter o cálculo para que a estratégia processará os parâmetros.</text:p>
        </text:list-item>
        <text:list-item>
          <text:p text:style-name="P16"><text:soft-page-break/><text:span text:style-name="T1">Resultado Esperado:</text:span> A estratégia em execução valida as fronteiras dos dados, recusa a operação e gera uma mensagem de erro de argumento inválido.</text:p>
        </text:list-item>
        <text:list-item>
          <text:p text:style-name="P16"><text:span text:style-name="T1">Pós-condição:</text:span> O cálculo é abortado preservando os dados originai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title/>
    <dc:description/>
    <dc:subject/>
    <meta:creation-date>2026-06-03T14:02:06.577762400</meta:creation-date>
    <meta:editing-cycles>3</meta:editing-cycles>
    <meta:editing-duration>PT3M45S</meta:editing-duration>
    <dc:date>2026-06-03T18:27:30.683620400</dc:date>
    <meta:document-statistic meta:table-count="0" meta:image-count="0" meta:object-count="0" meta:page-count="6" meta:paragraph-count="108" meta:word-count="1115" meta:character-count="7285" meta:non-whitespace-character-count="6368"/>
  </office:meta>
</office:document-meta>
</file>